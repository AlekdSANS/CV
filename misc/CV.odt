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8pt" fo:language="pl" fo:country="PL" officeooo:rsid="000dcef5" style:font-size-asian="8pt" style:font-size-complex="8pt"/>
    </style:style>
    <style:style style:name="P2" style:family="paragraph" style:parent-style-name="Horizontal_20_Line">
      <style:text-properties style:font-name="Liberation Sans" fo:font-size="8pt" fo:language="pl" fo:country="PL" style:font-size-asian="8pt" style:font-size-complex="8pt"/>
    </style:style>
    <style:style style:name="P3" style:family="paragraph" style:parent-style-name="Text_20_body">
      <style:text-properties style:font-name="Liberation Sans" fo:font-size="8pt" fo:language="pl" fo:country="PL" style:font-size-asian="8pt" style:font-size-complex="8pt"/>
    </style:style>
    <style:style style:name="P4" style:family="paragraph" style:parent-style-name="Heading_20_2">
      <style:text-properties fo:language="pl" fo:country="PL" officeooo:rsid="000e2d8b"/>
    </style:style>
    <style:style style:name="P5" style:family="paragraph" style:parent-style-name="Text_20_body">
      <style:text-properties fo:language="pl" fo:country="PL"/>
    </style:style>
    <style:style style:name="P6" style:family="paragraph" style:parent-style-name="Text_20_body" style:list-style-name="L1">
      <style:text-properties style:font-name="Liberation Sans" fo:font-size="8pt" fo:language="pl" fo:country="PL" style:font-size-asian="8pt" style:font-size-complex="8pt"/>
    </style:style>
    <style:style style:name="P7" style:family="paragraph" style:parent-style-name="Text_20_body" style:list-style-name="L2">
      <style:text-properties style:font-name="Liberation Sans" fo:font-size="8pt" fo:language="pl" fo:country="PL" style:font-size-asian="8pt" style:font-size-complex="8pt"/>
    </style:style>
    <style:style style:name="P8" style:family="paragraph" style:parent-style-name="Text_20_body" style:list-style-name="L3">
      <style:text-properties style:font-name="Liberation Sans" fo:font-size="8pt" fo:language="pl" fo:country="PL" style:font-size-asian="8pt" style:font-size-complex="8pt"/>
    </style:style>
    <style:style style:name="P9" style:family="paragraph" style:parent-style-name="Text_20_body" style:list-style-name="L4">
      <style:text-properties style:font-name="Liberation Sans" fo:font-size="8pt" fo:language="pl" fo:country="PL" style:font-size-asian="8pt" style:font-size-complex="8pt"/>
    </style:style>
    <style:style style:name="P10" style:family="paragraph" style:parent-style-name="Text_20_body" style:list-style-name="L5">
      <style:text-properties style:font-name="Liberation Sans" fo:font-size="8pt" fo:language="pl" fo:country="PL" style:font-size-asian="8pt" style:font-size-complex="8pt"/>
    </style:style>
    <style:style style:name="P11" style:family="paragraph" style:parent-style-name="Text_20_body" style:list-style-name="L6">
      <style:text-properties style:font-name="Liberation Sans" fo:font-size="8pt" fo:language="pl" fo:country="PL" style:font-size-asian="8pt" style:font-size-complex="8pt"/>
    </style:style>
    <style:style style:name="P12" style:family="paragraph" style:parent-style-name="Text_20_body">
      <style:text-properties officeooo:paragraph-rsid="00121799"/>
    </style:style>
    <style:style style:name="T1" style:family="text">
      <style:text-properties officeooo:rsid="0010c2cc"/>
    </style:style>
    <style:style style:name="T2" style:family="text">
      <style:text-properties style:font-name="Liberation Sans" fo:font-size="8pt" fo:language="pl" fo:country="PL" style:font-size-asian="8pt" style:font-size-complex="8pt"/>
    </style:style>
    <style:style style:name="T3" style:family="text">
      <style:text-properties style:font-name="Liberation Sans" fo:font-size="8pt" fo:language="pl" fo:country="PL" officeooo:rsid="00121799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OLEKSANDR MATSAFEI</text:h>
      <text:p text:style-name="P5">ul. Chabrowa 2/312, 55-011 Siechnice<text:line-break/>📞 +48 728 549 902<text:line-break/>✉️ alexmatsafei@gmail.com</text:p>
      <text:p text:style-name="P2"/>
      <text:h text:style-name="Heading_20_3" text:outline-level="3"><text:span text:style-name="Strong_20_Emphasis"><text:span text:style-name="T2">Podsumowanie zawodowe</text:span></text:span></text:h>
      <text:p text:style-name="P3">Jestem uczniem XII Technikum im. Haukego-Bosaka we Wrocławiu na kierunku technik informatyk. Poszukuję pracy dodatkowej, w której będę mógł rozwijać swoje umiejętności techniczne oraz zdobywać doświadczenie zawodowe. Jestem osobą odpowiedzialną, szybko uczącą się i zaangażowaną w powierzone obowiązki.</text:p>
      <text:p text:style-name="P2"/>
      <text:h text:style-name="Heading_20_3" text:outline-level="3"><text:span text:style-name="Strong_20_Emphasis"><text:span text:style-name="T2">Doświadczenie zawodowe</text:span></text:span></text:h>
      <text:p text:style-name="P12"><text:span text:style-name="Strong_20_Emphasis"><text:span text:style-name="T3">Praca nad stroną web Man&amp;Van</text:span></text:span></text:p>
      <text:p text:style-name="P12"><text:span text:style-name="Strong_20_Emphasis"><text:span text:style-name="T3">05.2026 - obecnie</text:span></text:span></text:p>
      <text:p text:style-name="P12"><text:span text:style-name="Strong_20_Emphasis"><text:span text:style-name="T3">___________________________________________</text:span></text:span></text:p>
      <text:p text:style-name="Text_20_body"><text:span text:style-name="Strong_20_Emphasis"><text:span text:style-name="T2">Tapiceria Samochodowa i Meblowa AVN</text:span></text:span><text:span text:style-name="T2"><text:line-break/></text:span><text:span text:style-name="Emphasis"><text:span text:style-name="T2">03.2025 – obecnie</text:span></text:span><text:span text:style-name="T2"><text:line-break/></text:span><text:span text:style-name="Strong_20_Emphasis"><text:span text:style-name="T2">Pomocnik / Detailer / Tapicer</text:span></text:span></text:p>
      <text:p text:style-name="Text_20_body"><text:span text:style-name="Strong_20_Emphasis"><text:span text:style-name="T2">Zakres obowiązków:</text:span></text:span></text:p>
      <text:list text:style-name="L1">
        <text:list-item>
          <text:p text:style-name="P6">pomoc przy pracach mechanicznych i tapicerskich,</text:p>
        </text:list-item>
        <text:list-item>
          <text:p text:style-name="P6">detailing samochodowy,</text:p>
        </text:list-item>
        <text:list-item>
          <text:p text:style-name="P6">przygotowanie oraz montaż elementów tapicerki,</text:p>
        </text:list-item>
        <text:list-item>
          <text:p text:style-name="P6">dbanie o stanowisko pracy i narzędzia.</text:p>
        </text:list-item>
      </text:list>
      <text:p text:style-name="P2"/>
      <text:p text:style-name="Text_20_body"><text:span text:style-name="Strong_20_Emphasis"><text:span text:style-name="T2">Praktyka zawodowa – XII Technikum im. Haukego-Bosaka, Wrocław</text:span></text:span><text:span text:style-name="T2"><text:line-break/></text:span><text:span text:style-name="Emphasis"><text:span text:style-name="T2">04.2025 – 05.2025</text:span></text:span></text:p>
      <text:p text:style-name="Text_20_body"><text:span text:style-name="Strong_20_Emphasis"><text:span text:style-name="T2">Zakres obowiązków:</text:span></text:span></text:p>
      <text:list text:style-name="L2">
        <text:list-item>
          <text:p text:style-name="P7">diagnozowanie i naprawa komputerów,</text:p>
        </text:list-item>
        <text:list-item>
          <text:p text:style-name="P7">konfiguracja systemów operacyjnych,</text:p>
        </text:list-item>
        <text:list-item>
          <text:p text:style-name="P7">przygotowywanie i prowadzenie dokumentacji technicznej.</text:p>
        </text:list-item>
      </text:list>
      <text:p text:style-name="P2"/>
      <text:p text:style-name="Text_20_body"><text:span text:style-name="Strong_20_Emphasis"><text:span text:style-name="T2">Praktyka zawodowa – Tapiceria Samochodowa i Meblowa AVN</text:span></text:span><text:span text:style-name="T2"><text:line-break/></text:span><text:span text:style-name="Emphasis"><text:span text:style-name="T2">01.2026 – 02.2026</text:span></text:span></text:p>
      <text:p text:style-name="Text_20_body"><text:span text:style-name="Strong_20_Emphasis"><text:span text:style-name="T2">Zakres obowiązków:</text:span></text:span></text:p>
      <text:list text:style-name="L3">
        <text:list-item>
          <text:p text:style-name="P8">konfiguracja sieci Wi-Fi,</text:p>
        </text:list-item>
        <text:list-item>
          <text:p text:style-name="P8">instalacja oraz konfiguracja systemów monitoringu,</text:p>
        </text:list-item>
        <text:list-item>
          <text:p text:style-name="P8">przygotowanie urządzeń do pracy.</text:p>
        </text:list-item>
      </text:list>
      <text:p text:style-name="P2"/>
      <text:h text:style-name="Heading_20_3" text:outline-level="3"><text:soft-page-break/><text:span text:style-name="Strong_20_Emphasis"><text:span text:style-name="T2">Wykształcenie</text:span></text:span></text:h>
      <text:p text:style-name="Text_20_body"><text:span text:style-name="Strong_20_Emphasis"><text:span text:style-name="T2">XII Technikum im. Haukego-Bosaka, Wrocław</text:span></text:span><text:span text:style-name="T2"><text:line-break/>Kierunek: </text:span><text:span text:style-name="Strong_20_Emphasis"><text:span text:style-name="T2">technik informatyk</text:span></text:span><text:span text:style-name="T2"><text:line-break/>(w trakcie nauki)</text:span></text:p>
      <text:p text:style-name="P2"/>
      <text:h text:style-name="Heading_20_3" text:outline-level="3"><text:span text:style-name="Strong_20_Emphasis"><text:span text:style-name="T2">Umiejętności</text:span></text:span></text:h>
      <text:p text:style-name="Text_20_body"><text:span text:style-name="Strong_20_Emphasis"><text:span text:style-name="T2">Umiejętności techniczne:</text:span></text:span></text:p>
      <text:list text:style-name="L4">
        <text:list-item>
          <text:p text:style-name="P9">obsługa pakietu Microsoft Office oraz LibreOffice,</text:p>
        </text:list-item>
        <text:list-item>
          <text:p text:style-name="P9">podstawowa konfiguracja sieci komputerowych,</text:p>
        </text:list-item>
        <text:list-item>
          <text:p text:style-name="P9">instalacja i konfiguracja systemów operacyjnych,</text:p>
        </text:list-item>
        <text:list-item>
          <text:p text:style-name="P9">podstawy monitoringu i sprzętu komputerowego.</text:p>
        </text:list-item>
      </text:list>
      <text:p text:style-name="Text_20_body"><text:span text:style-name="Strong_20_Emphasis"><text:span text:style-name="T2">Języki:</text:span></text:span></text:p>
      <text:list text:style-name="L5">
        <text:list-item>
          <text:p text:style-name="P10">język angielski – poziom B2</text:p>
        </text:list-item>
        <text:list-item>
          <text:p text:style-name="P10">język polski – <text:span text:style-name="T1">poziom </text:span>B<text:span text:style-name="T1">2</text:span></text:p>
        </text:list-item>
        <text:list-item>
          <text:p text:style-name="P10">język rosyjski – <text:span text:style-name="T1">język rodzinny</text:span></text:p>
        </text:list-item>
      </text:list>
      <text:p text:style-name="Text_20_body"><text:span text:style-name="Strong_20_Emphasis"><text:span text:style-name="T2">Umiejętności miękkie:</text:span></text:span></text:p>
      <text:list text:style-name="L6">
        <text:list-item>
          <text:p text:style-name="P11">odpowiedzialność i punktualność,</text:p>
        </text:list-item>
        <text:list-item>
          <text:p text:style-name="P11">umiejętność pracy w zespole,</text:p>
        </text:list-item>
        <text:list-item>
          <text:p text:style-name="P11">dobra organizacja pracy,</text:p>
        </text:list-item>
        <text:list-item>
          <text:p text:style-name="P11">szybkie przyswajanie nowych umiejętności.</text:p>
        </text:list-item>
      </text:list>
      <text:p text:style-name="P2"/>
      <text:h text:style-name="Heading_20_3" text:outline-level="3"><text:span text:style-name="Strong_20_Emphasis"><text:span text:style-name="T2">Zainteresowania</text:span></text:span></text:h>
      <text:p text:style-name="P3">W wolnym czasie zajmuję się programowaniem aplikacji internetowych. Interesuję się również koszykówką oraz aktywnością fizyczną – regularnie uczęszczam na siłownię.</text:p>
      <text:p text:style-name="P2"/>
      <text:p text:style-name="Text_20_body"><text:span text:style-name="Strong_20_Emphasis"><text:span text:style-name="T2">Wyrażam zgodę na przetwarzanie moich danych osobowych zawartych w CV w celu realizacji procesu rekrutacji zgodnie z obowiązującymi przepisami prawa.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2T19:18:30.307000000</meta:creation-date>
    <dc:date>2026-05-26T01:42:54.202000000</dc:date>
    <meta:editing-duration>PT11M28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4" meta:word-count="269" meta:character-count="2112" meta:non-whitespace-character-count="1899"/>
  </office:meta>
</office:document-meta>
</file>